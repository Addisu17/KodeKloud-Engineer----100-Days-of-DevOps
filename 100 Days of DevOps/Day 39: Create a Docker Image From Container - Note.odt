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2"/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Preformatted_20_Text" style:list-style-name="L5">
      <style:paragraph-properties fo:margin-top="0in" fo:margin-bottom="0.1965in" style:contextual-spacing="false"/>
    </style:style>
    <style:style style:name="P4" style:family="paragraph" style:parent-style-name="Preformatted_20_Text" style:list-style-name="L7"/>
    <style:style style:name="P5" style:family="paragraph" style:parent-style-name="Preformatted_20_Text" style:list-style-name="L9">
      <style:paragraph-properties fo:margin-top="0in" fo:margin-bottom="0.1965in" style:contextual-spacing="false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9">
      <style:paragraph-properties fo:margin-top="0in" fo:margin-bottom="0in" style:contextual-spacing="false"/>
    </style:style>
    <style:style style:name="P15" style:family="paragraph" style:parent-style-name="Text_20_body" style:list-style-name="L10"/>
    <style:style style:name="P16" style:family="paragraph" style:parent-style-name="Text_20_body" style:list-style-name="L10">
      <style:paragraph-properties fo:margin-top="0in" fo:margin-bottom="0in" style:contextual-spacing="false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he key lesson from this task is understanding the difference between a <text:span text:style-name="Strong_20_Emphasis">container</text:span> and an <text:span text:style-name="Strong_20_Emphasis">image</text:span>, and how to preserve changes made inside a running container.</text:p>
      <text:h text:style-name="Heading_20_3" text:outline-level="3">What you should learn</text:h>
      <text:list text:style-name="L1">
        <text:list-item>
          <text:p text:style-name="P6"><text:span text:style-name="Strong_20_Emphasis">A container is a running instance of an image</text:span></text:p>
          <text:list>
            <text:list-item>
              <text:p text:style-name="P7">Image → Template (read-only) </text:p>
            </text:list-item>
            <text:list-item>
              <text:p text:style-name="P6">Container → Running, writable instance of that template </text:p>
            </text:list-item>
          </text:list>
          <text:p text:style-name="P6">Example:</text:p>
        </text:list-item>
      </text:list>
      <text:section text:style-name="Sect1" text:name="code-block-viewer">
        <text:list text:style-name="L2">
          <text:list-item>
            <text:p text:style-name="P1"><text:span text:style-name="Source_20_Text">ubuntu:latest (image)</text:span></text:p>
          </text:list-item>
        </text:list>
        <text:p text:style-name="Preformatted_20_Text"><text:span text:style-name="Source_20_Text"><text:s text:c="8"/>│</text:span></text:p>
        <text:p text:style-name="Preformatted_20_Text"><text:span text:style-name="Source_20_Text"><text:s text:c="8"/>▼</text:span></text:p>
        <text:p text:style-name="P2"><text:span text:style-name="Source_20_Text">ubuntu_latest (running container)</text:span></text:p>
      </text:section>
      <text:list text:style-name="L3">
        <text:list-item>
          <text:p text:style-name="P8"><text:span text:style-name="Strong_20_Emphasis">Changes inside a container are not automatically saved as an image</text:span><text:line-break/>If you install packages or modify files inside a container, those changes exist only in that container. </text:p>
        </text:list-item>
      </text:list>
      <text:list text:style-name="L4">
        <text:list-item>
          <text:p text:style-name="P9"><text:span text:style-name="Strong_20_Emphasis"><text:span text:style-name="Source_20_Text">docker commit</text:span></text:span><text:span text:style-name="Strong_20_Emphasis"> creates a new image from a container</text:span><text:line-break/>Syntax:</text:p>
        </text:list-item>
      </text:list>
      <text:section text:style-name="Sect1" text:name="Section1">
        <text:p text:style-name="P2"><text:bookmark text:name="code-block-viewer"/><text:span text:style-name="Source_20_Text">docker commit &lt;container_name_or_id&gt; &lt;repository&gt;:&lt;tag&gt;</text:span></text:p>
      </text:section>
      <text:p text:style-name="Text_20_body">Example:</text:p>
      <text:section text:style-name="Sect1" text:name="Section2">
        <text:list xml:id="list3054653331" text:style-name="L5">
          <text:list-item>
            <text:p text:style-name="P3"><text:bookmark text:name="code-block-viewer Copy 1"/><text:span text:style-name="Source_20_Text">docker commit ubuntu_latest media:xfusion</text:span></text:p>
          </text:list-item>
        </text:list>
      </text:section>
      <text:list xml:id="list163505900148169" text:continue-numbering="true" text:style-name="L5">
        <text:list-item>
          <text:p text:style-name="P10">This captures the container's current filesystem and saves it as a new image.</text:p>
        </text:list-item>
      </text:list>
      <text:list text:style-name="L6">
        <text:list-item>
          <text:p text:style-name="P11"><text:span text:style-name="Strong_20_Emphasis">Image naming convention</text:span><text:line-break/>Docker images are usually named as:</text:p>
        </text:list-item>
      </text:list>
      <text:section text:style-name="Sect1" text:name="Section3">
        <text:p text:style-name="P2"><text:bookmark text:name="code-block-viewer Copy 2"/><text:span text:style-name="Source_20_Text">repository:tag</text:span></text:p>
      </text:section>
      <text:p text:style-name="Text_20_body">Examples:</text:p>
      <text:section text:style-name="Sect1" text:name="Section4">
        <text:list text:style-name="L7">
          <text:list-item>
            <text:p text:style-name="P4"><text:bookmark text:name="code-block-viewer Copy 3"/><text:span text:style-name="Source_20_Text">ubuntu:latest</text:span></text:p>
          </text:list-item>
        </text:list>
        <text:p text:style-name="Preformatted_20_Text"><text:span text:style-name="Source_20_Text">nginx:1.27</text:span></text:p>
        <text:p text:style-name="P2"><text:span text:style-name="Source_20_Text">media:xfusion</text:span></text:p>
      </text:section>
      <text:list text:style-name="L8">
        <text:list-item>
          <text:p text:style-name="P12"><text:span text:style-name="Strong_20_Emphasis">Useful Docker commands</text:span><text:line-break/>Check running containers:</text:p>
        </text:list-item>
      </text:list>
      <text:section text:style-name="Sect1" text:name="Section5">
        <text:p text:style-name="P2"><text:bookmark text:name="code-block-viewer Copy 4"/><text:span text:style-name="Source_20_Text">docker ps</text:span></text:p>
      </text:section>
      <text:p text:style-name="Text_20_body">List images:</text:p>
      <text:section text:style-name="Sect1" text:name="Section6">
        <text:p text:style-name="P2"><text:bookmark text:name="code-block-viewer Copy 5"/><text:span text:style-name="Source_20_Text">docker images</text:span></text:p>
      </text:section>
      <text:p text:style-name="Text_20_body">Create an image from a container:</text:p>
      <text:section text:style-name="Sect1" text:name="Section7">
        <text:list xml:id="list2079728441" text:style-name="L9">
          <text:list-item>
            <text:p text:style-name="P5"><text:bookmark text:name="code-block-viewer Copy 6"/><text:span text:style-name="Source_20_Text">docker commit &lt;container&gt; &lt;image:tag&gt;</text:span></text:p>
          </text:list-item>
        </text:list>
      </text:section>
      <text:list xml:id="list163505059303083" text:continue-numbering="true" text:style-name="L9">
        <text:list-item>
          <text:p text:style-name="P14"><text:span text:style-name="Strong_20_Emphasis">When to use </text:span><text:span text:style-name="Strong_20_Emphasis"><text:span text:style-name="Source_20_Text">docker commit</text:span></text:span> </text:p>
          <text:list>
            <text:list-item>
              <text:p text:style-name="P14">Good for quickly backing up a container during testing or troubleshooting. </text:p>
            </text:list-item>
            <text:list-item>
              <text:p text:style-name="P14"><text:soft-page-break/>Common in labs, demos, or emergency snapshots. </text:p>
            </text:list-item>
          </text:list>
        </text:list-item>
        <text:list-item>
          <text:p text:style-name="P13"><text:span text:style-name="Strong_20_Emphasis">Best practice in production</text:span><text:line-break/>While <text:span text:style-name="Source_20_Text">docker commit</text:span> is useful, production environments typically use a <text:span text:style-name="Strong_20_Emphasis">Dockerfile</text:span> to build images. A Dockerfile makes the build process reproducible, version-controlled, and easy for others to understand and rebuild. </text:p>
        </text:list-item>
      </text:list>
      <text:h text:style-name="Heading_20_3" text:outline-level="3">Quick memory trick</text:h>
      <text:p text:style-name="Text_20_body">Think of it like this:</text:p>
      <text:list text:style-name="L10">
        <text:list-item>
          <text:p text:style-name="P16"><text:span text:style-name="Strong_20_Emphasis">Image</text:span> = Blueprint 📋 </text:p>
        </text:list-item>
        <text:list-item>
          <text:p text:style-name="P16"><text:span text:style-name="Strong_20_Emphasis">Container</text:span> = Running machine 🚀 </text:p>
        </text:list-item>
        <text:list-item>
          <text:p text:style-name="P16"><text:span text:style-name="Strong_20_Emphasis">Commit</text:span> = Take a snapshot of the running machine 📸 </text:p>
        </text:list-item>
        <text:list-item>
          <text:p text:style-name="P15"><text:span text:style-name="Strong_20_Emphasis">Dockerfile</text:span> = Instructions to build the machine from scratch 🏗️ </text:p>
        </text:list-item>
      </text:list>
      <text:h text:style-name="Heading_20_3" text:outline-level="3">Exam/Lab tip</text:h>
      <text:p text:style-name="Text_20_body">If you see a task like:</text:p>
      <text:p text:style-name="Quotations">"Create an image <text:span text:style-name="Source_20_Text">&lt;repo&gt;:&lt;tag&gt;</text:span> from a running container <text:span text:style-name="Source_20_Text">&lt;container&gt;</text:span>"</text:p>
      <text:p text:style-name="Text_20_body">Immediately think:</text:p>
      <text:section text:style-name="Sect1" text:name="Section8">
        <text:p text:style-name="P2"><text:bookmark text:name="code-block-viewer Copy 7"/><text:span text:style-name="Source_20_Text">docker commit &lt;container&gt; &lt;repo&gt;:&lt;tag&gt;</text:span></text:p>
      </text:section>
      <text:p text:style-name="Text_20_body">Then verify:</text:p>
      <text:section text:style-name="Sect1" text:name="Section9">
        <text:p text:style-name="P2"><text:bookmark text:name="code-block-viewer Copy 8"/><text:span text:style-name="Source_20_Text">docker images</text:span></text:p>
      </text:section>
      <text:p text:style-name="Text_20_body">That's the core concept this exercise is designed to teach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0T16:33:58.583917450</meta:creation-date>
    <dc:date>2026-07-20T16:35:04.056284647</dc:date>
    <meta:editing-duration>PT1M6S</meta:editing-duration>
    <meta:editing-cycles>1</meta:editing-cycles>
    <meta:document-statistic meta:table-count="0" meta:image-count="0" meta:object-count="0" meta:page-count="2" meta:paragraph-count="46" meta:word-count="306" meta:character-count="1928" meta:non-whitespace-character-count="1661"/>
    <meta:generator>LibreOffice/7.4.7.2$Linux_X86_64 LibreOffice_project/40$Build-2</meta:generator>
  </office:meta>
</office:document-meta>
</file>